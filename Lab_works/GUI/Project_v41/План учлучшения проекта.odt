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5e54" officeooo:paragraph-rsid="00125e54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лан улучшения проекта «Интерактивная карта ЖД Москвы»</text:p>
      <text:p text:style-name="P1"/>
      <text:p text:style-name="P1">1) Нанести точные координаты станций и других объектов (в том числе добавить все недостающие станции и объекты)</text:p>
      <text:p text:style-name="P1">2) Соединить все точки линиями — жд пути → получить максимально приближенную к действительности карту МЖ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9T20:00:56.813060494</meta:creation-date>
    <dc:date>2026-05-10T18:45:13.206023500</dc:date>
    <meta:editing-duration>PT5M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39" meta:character-count="270" meta:non-whitespace-character-count="233"/>
  </office:meta>
</office:document-meta>
</file>