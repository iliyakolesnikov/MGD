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5e54" officeooo:paragraph-rsid="00125e54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лан улучшения проекта «Интерактивная карта ЖД Москвы»</text:p>
      <text:p text:style-name="P1"/>
      <text:p text:style-name="P1">1) Нанести точные координаты станций и других объектов ( в том числе добавить все недостающие станции и объекты)</text:p>
      <text:p text:style-name="P1">2) Соединить все точки линиями — жд пути → получить максимально приближенную к действительности карту МЖД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9T20:00:56.813060494</meta:creation-date>
    <dc:date>2026-05-09T20:05:24.369750633</dc:date>
    <meta:editing-duration>PT4M28S</meta:editing-duration>
    <meta:editing-cycles>1</meta:editing-cycles>
    <meta:document-statistic meta:table-count="0" meta:image-count="0" meta:object-count="0" meta:page-count="1" meta:paragraph-count="3" meta:word-count="40" meta:character-count="271" meta:non-whitespace-character-count="233"/>
    <meta:generator>LibreOffice/24.2.7.2$Linux_X86_64 LibreOffice_project/420$Build-2</meta:generator>
  </office:meta>
</office:document-meta>
</file>